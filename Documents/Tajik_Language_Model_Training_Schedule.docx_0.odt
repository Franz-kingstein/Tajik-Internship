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4B0000062C04F123D4654F7F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3">
      <style:paragraph-properties fo:margin-top="0.353cm" fo:margin-bottom="0.499cm" style:contextual-spacing="false"/>
    </style:style>
    <style:style style:name="P2" style:family="paragraph" style:parent-style-name="Heading_20_4">
      <style:paragraph-properties fo:margin-top="0.353cm" fo:margin-bottom="0.499cm" style:contextual-spacing="false"/>
    </style:style>
    <style:style style:name="P3" style:family="paragraph" style:parent-style-name="List_20_Bullet" style:list-style-name="WWNum1"/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ptimized Tajik Language Speech Recognition Training Schedule</text:p>
      <text:p text:style-name="Subtitle"><text:span text:style-name="Strong_20_Emphasis">Prepared by:</text:span> Franz Kingstein Nesakumar</text:p>
      <text:p text:style-name="Horizontal_20_Line"/>
      <text:h text:style-name="P1" text:outline-level="3">1. Objective</text:h>
      <text:p text:style-name="Text_20_body">To develop a compact and effective speech recognition model for the Tajik language within a 12-day timeline. The model will transcribe spoken Tajik audio into text, using pre-trained architectures like Whisper-small or Wav2Vec2, adapted to work within laptop GPU constraints.</text:p>
      <text:p text:style-name="Horizontal_20_Line"/>
      <text:h text:style-name="P1" text:outline-level="3">2. Requirements</text:h>
      <text:list xml:id="list1176164180" text:style-name="L1">
        <text:list-item>
          <text:p text:style-name="P4"><text:span text:style-name="Strong_20_Emphasis">Data Collection:</text:span></text:p>
          <text:list>
            <text:list-item>
              <text:p text:style-name="P4">Gather Tajik speech audio from radio, interviews, podcasts, and public recordings.</text:p>
            </text:list-item>
          </text:list>
        </text:list-item>
        <text:list-item>
          <text:p text:style-name="P4"><text:span text:style-name="Strong_20_Emphasis">Preprocessing:</text:span></text:p>
          <text:list>
            <text:list-item>
              <text:p text:style-name="P4">Clean audio (WAV preferred), segment it, align it with transcripts, normalize file formats.</text:p>
            </text:list-item>
          </text:list>
        </text:list-item>
        <text:list-item>
          <text:p text:style-name="P4"><text:span text:style-name="Strong_20_Emphasis">Model Architecture:</text:span></text:p>
          <text:list>
            <text:list-item>
              <text:p text:style-name="P4">Use a lightweight pretrained model such as Whisper-small or HuggingFace’s Wav2Vec2.</text:p>
            </text:list-item>
          </text:list>
        </text:list-item>
        <text:list-item>
          <text:p text:style-name="P4"><text:span text:style-name="Strong_20_Emphasis">Training Environment:</text:span></text:p>
          <text:list>
            <text:list-item>
              <text:p text:style-name="P4">Python 3.9+, PyTorch, Hugging Face Transformers</text:p>
            </text:list-item>
            <text:list-item>
              <text:p text:style-name="P4">Laptop GPU: NVIDIA RTX 30–60 series (4–8 GB VRAM)</text:p>
            </text:list-item>
            <text:list-item>
              <text:p text:style-name="P4">Training Time: 1–3 hours/day for subset training</text:p>
            </text:list-item>
            <text:list-item>
              <text:p text:style-name="P4">Tools: Google Colab (Pro), or local WSL2/Linux with CUDA</text:p>
            </text:list-item>
          </text:list>
        </text:list-item>
      </text:list>
      <text:p text:style-name="Horizontal_20_Line"/>
      <text:h text:style-name="P1" text:outline-level="3"><text:soft-page-break/>3. Condensed Training Schedule (12 Days)</text:h>
      <text:h text:style-name="P2" text:outline-level="4">Day 1–3: Data Collection &amp; Preprocessing</text:h>
      <text:list xml:id="list3489255025" text:style-name="L2">
        <text:list-item>
          <text:p text:style-name="P5">Gather and segment audio datasets</text:p>
        </text:list-item>
        <text:list-item>
          <text:p text:style-name="P5">Clean, tokenize, and align audio-text pairs</text:p>
        </text:list-item>
      </text:list>
      <text:h text:style-name="P2" text:outline-level="4">Day 4–5: Model Setup &amp; Configuration</text:h>
      <text:list xml:id="list474361406" text:style-name="L3">
        <text:list-item>
          <text:p text:style-name="P6">Select model (Whisper-small, Wav2Vec2)</text:p>
        </text:list-item>
        <text:list-item>
          <text:p text:style-name="P6">Configure environment, verify dataset format</text:p>
        </text:list-item>
      </text:list>
      <text:h text:style-name="P2" text:outline-level="4">Day 6–8: Training (Subset)</text:h>
      <text:list xml:id="list298527466" text:style-name="L4">
        <text:list-item>
          <text:p text:style-name="P7">Train using small batches compatible with limited GPU</text:p>
        </text:list-item>
        <text:list-item>
          <text:p text:style-name="P7">Adjust learning rates and batch sizes as needed</text:p>
        </text:list-item>
      </text:list>
      <text:h text:style-name="P2" text:outline-level="4">Day 9–10: Evaluation &amp; Fine-tuning</text:h>
      <text:list xml:id="list79769914" text:style-name="L5">
        <text:list-item>
          <text:p text:style-name="P8">Measure performance (Word Error Rate)</text:p>
        </text:list-item>
        <text:list-item>
          <text:p text:style-name="P8">Retrain on specific segments to improve accuracy</text:p>
        </text:list-item>
      </text:list>
      <text:h text:style-name="P2" text:outline-level="4">Day 11: Final Testing</text:h>
      <text:list xml:id="list2062395444" text:style-name="L6">
        <text:list-item>
          <text:p text:style-name="P9">Test with unseen audio samples</text:p>
        </text:list-item>
        <text:list-item>
          <text:p text:style-name="P9">Note WER and model reliability across dialects</text:p>
        </text:list-item>
      </text:list>
      <text:h text:style-name="P2" text:outline-level="4">Day 12: Documentation &amp; Presentation</text:h>
      <text:list xml:id="list2666693414" text:style-name="L7">
        <text:list-item>
          <text:p text:style-name="P10">Summarize tools, data, and results</text:p>
        </text:list-item>
        <text:list-item>
          <text:p text:style-name="P10">Prepare presentation/report for stakeholders</text:p>
        </text:list-item>
      </text:list>
      <text:p text:style-name="Text_20_body"><draw:frame draw:style-name="fr1" draw:name="Image1" text:anchor-type="char" svg:width="15.24cm" svg:height="10.121cm" draw:z-index="0"><draw:image xlink:href="Pictures/100000010000094B0000062C04F123D4654F7F16.png" xlink:type="simple" xlink:show="embed" xlink:actuate="onLoad" draw:mime-type="image/png"/></draw:frame><text:soft-page-break/></text:p>
      <text:p text:style-name="Horizontal_20_Line"/>
      <text:h text:style-name="P1" text:outline-level="3">4. Pre-built Model Option</text:h>
      <text:list xml:id="list4131270026" text:style-name="L8">
        <text:list-item>
          <text:p text:style-name="P11">Use existing multilingual STT models like Whisper or Vosk</text:p>
        </text:list-item>
        <text:list-item>
          <text:p text:style-name="P11">Faster deployment, avoids full training</text:p>
        </text:list-item>
        <text:list-item>
          <text:p text:style-name="P11">May need minor fine-tuning for Tajik</text:p>
        </text:list-item>
      </text:list>
      <text:p text:style-name="Horizontal_20_Line"/>
      <text:h text:style-name="P1" text:outline-level="3">5. Recommendation</text:h>
      <text:p text:style-name="Text_20_body">This revised 12-day plan provides a realistic, resource-aware schedule for building a Tajik STT module. Choose custom training for control and accuracy, or use pre-trained models for faster results on a limited budget and hardware.</text:p>
      <text:p text:style-name="Horizontal_20_Line"/>
      <text:p text:style-name="Text_20_body"><text:span text:style-name="Strong_20_Emphasis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right="0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class="list">
      <style:paragraph-properties fo:margin-left="1.27cm" fo:margin-right="0cm" fo:margin-top="0cm" fo:margin-bottom="0.353cm" style:contextual-spacing="true" fo:text-indent="-0.635cm" style:auto-text-indent="false"/>
    </style:style>
    <style:style style:name="List_20_3" style:display-name="List 3" style:family="paragraph" style:parent-style-name="Standard" style:class="list">
      <style:paragraph-properties fo:margin-left="1.905cm" fo:margin-right="0cm" fo:margin-top="0cm" fo:margin-bottom="0.353cm" style:contextual-spacing="true" fo:text-indent="-0.635cm" style:auto-text-indent="false"/>
    </style:style>
    <style:style style:name="List_20_Bullet" style:display-name="List Bullet" style:family="paragraph" style:parent-style-name="Standard" style:list-style-name="WWNum1">
      <style:paragraph-properties fo:margin-top="0cm" fo:margin-bottom="0.353cm" style:contextual-spacing="true"/>
    </style:style>
    <style:style style:name="List_20_Bullet_20_2" style:display-name="List Bullet 2" style:family="paragraph" style:parent-style-name="Standard" style:list-style-name="WWNum2">
      <style:paragraph-properties fo:margin-top="0cm" fo:margin-bottom="0.353cm" style:contextual-spacing="true"/>
    </style:style>
    <style:style style:name="List_20_Bullet_20_3" style:display-name="List Bullet 3" style:family="paragraph" style:parent-style-name="Standard" style:list-style-name="WWNum3">
      <style:paragraph-properties fo:margin-top="0cm" fo:margin-bottom="0.353cm" style:contextual-spacing="true"/>
    </style:style>
    <style:style style:name="List_20_Number" style:display-name="List Number" style:family="paragraph" style:parent-style-name="Standard" style:list-style-name="WWNum5">
      <style:paragraph-properties fo:margin-top="0cm" fo:margin-bottom="0.353cm" style:contextual-spacing="true"/>
    </style:style>
    <style:style style:name="List_20_Number_20_2" style:display-name="List Number 2" style:family="paragraph" style:parent-style-name="Standard" style:list-style-name="WWNum6">
      <style:paragraph-properties fo:margin-top="0cm" fo:margin-bottom="0.353cm" style:contextual-spacing="true"/>
    </style:style>
    <style:style style:name="List_20_Number_20_3" style:display-name="List Number 3" style:family="paragraph" style:parent-style-name="Standard" style:list-style-name="WWNum7">
      <style:paragraph-properties fo:margin-top="0cm" fo:margin-bottom="0.353cm" style:contextual-spacing="true"/>
    </style:style>
    <style:style style:name="List_20_Continue" style:display-name="List Continue" style:family="paragraph" style:parent-style-name="Standard">
      <style:paragraph-properties fo:margin-left="0.635cm" fo:margin-right="0cm" fo:margin-top="0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cm" fo:margin-bottom="0.212cm" style:contextual-spacing="true" fo:text-indent="0cm" style:auto-text-indent="fals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/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shadow="none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5-05-28T15:33:11.958151986</dc:date>
    <meta:editing-duration>PT13M38S</meta:editing-duration>
    <meta:generator>LibreOffice/7.3.7.2$Linux_X86_64 LibreOffice_project/30$Build-2</meta:generator>
    <meta:print-date>2025-05-28T15:16:20.704681106</meta:print-date>
    <meta:document-statistic meta:table-count="0" meta:image-count="1" meta:object-count="0" meta:page-count="3" meta:paragraph-count="42" meta:word-count="329" meta:character-count="2089" meta:non-whitespace-character-count="1835"/>
    <meta:user-defined meta:name="AppVersion">14.0000</meta:user-defined>
    <meta:template xlink:type="simple" xlink:actuate="onRequest" xlink:title="Normal.dotm" xlink:href=""/>
  </office:meta>
</office:document-meta>
</file>