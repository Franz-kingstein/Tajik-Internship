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7.477cm"/>
    </style:style>
    <style:style style:name="Table1.B" style:family="table-column">
      <style:table-column-properties style:column-width="9.523cm"/>
    </style:style>
    <style:style style:name="Table1.A1" style:family="table-cell">
      <style:table-cell-properties style:vertical-align="middle" fo:padding="0.049cm" fo:border="none"/>
    </style:style>
    <style:style style:name="Table2" style:family="table">
      <style:table-properties style:width="12.614cm" table:align="left"/>
    </style:style>
    <style:style style:name="Table2.A" style:family="table-column">
      <style:table-column-properties style:column-width="2.124cm"/>
    </style:style>
    <style:style style:name="Table2.B" style:family="table-column">
      <style:table-column-properties style:column-width="2.887cm"/>
    </style:style>
    <style:style style:name="Table2.C" style:family="table-column">
      <style:table-column-properties style:column-width="7.602cm"/>
    </style:style>
    <style:style style:name="Table2.A1" style:family="table-cell">
      <style:table-cell-properties style:vertical-align="middle" fo:padding="0.049cm" fo:border="none"/>
    </style:style>
    <style:style style:name="Table3" style:family="table">
      <style:table-properties style:width="10.763cm" table:align="left"/>
    </style:style>
    <style:style style:name="Table3.A" style:family="table-column">
      <style:table-column-properties style:column-width="6.401cm"/>
    </style:style>
    <style:style style:name="Table3.B" style:family="table-column">
      <style:table-column-properties style:column-width="2.547cm"/>
    </style:style>
    <style:style style:name="Table3.C" style:family="table-column">
      <style:table-column-properties style:column-width="1.815cm"/>
    </style:style>
    <style:style style:name="Table3.A1" style:family="table-cell">
      <style:table-cell-properties style:vertical-align="middle" fo:padding="0.049cm" fo:border="none"/>
    </style:style>
    <style:style style:name="Table4" style:family="table">
      <style:table-properties style:width="12.016cm" table:align="left"/>
    </style:style>
    <style:style style:name="Table4.A" style:family="table-column">
      <style:table-column-properties style:column-width="6.899cm"/>
    </style:style>
    <style:style style:name="Table4.B" style:family="table-column">
      <style:table-column-properties style:column-width="2.335cm"/>
    </style:style>
    <style:style style:name="Table4.C" style:family="table-column">
      <style:table-column-properties style:column-width="2.782cm"/>
    </style:style>
    <style:style style:name="Table4.A1" style:family="table-cell">
      <style:table-cell-properties style:vertical-align="middle" fo:padding="0.049cm" fo:border="none"/>
    </style:style>
    <style:style style:name="P1" style:family="paragraph" style:parent-style-name="Title">
      <style:paragraph-properties fo:line-height="150%"/>
    </style:style>
    <style:style style:name="P2" style:family="paragraph" style:parent-style-name="Heading_20_2">
      <style:paragraph-properties fo:line-height="150%"/>
    </style:style>
    <style:style style:name="P3" style:family="paragraph" style:parent-style-name="Heading_20_3">
      <style:paragraph-properties fo:line-height="150%"/>
    </style:style>
    <style:style style:name="P4" style:family="paragraph" style:parent-style-name="Horizontal_20_Line">
      <style:paragraph-properties fo:line-height="150%"/>
    </style:style>
    <style:style style:name="P5" style:family="paragraph" style:parent-style-name="Table_20_Contents">
      <style:paragraph-properties fo:line-height="150%"/>
    </style:style>
    <style:style style:name="P6" style:family="paragraph" style:parent-style-name="Table_20_Heading">
      <style:paragraph-properties fo:line-height="150%"/>
    </style:style>
    <style:style style:name="P7" style:family="paragraph" style:parent-style-name="Text_20_body">
      <style:paragraph-properties fo:line-height="150%"/>
    </style:style>
    <style:style style:name="P8" style:family="paragraph" style:parent-style-name="Text_20_body">
      <style:paragraph-properties fo:line-height="150%"/>
      <style:text-properties officeooo:paragraph-rsid="0004300f"/>
    </style:style>
    <style:style style:name="P9" style:family="paragraph" style:parent-style-name="Text_20_body">
      <style:paragraph-properties fo:line-height="150%"/>
      <style:text-properties fo:font-weight="bold" style:font-weight-asian="bold" style:font-weight-complex="bold"/>
    </style:style>
    <style:style style:name="P10" style:family="paragraph" style:parent-style-name="Heading_20_4">
      <style:paragraph-properties fo:line-height="150%"/>
    </style:style>
    <style:style style:name="P11" style:family="paragraph" style:parent-style-name="Heading_20_1">
      <style:paragraph-properties fo:line-height="150%"/>
    </style:style>
    <style:style style:name="P12" style:family="paragraph" style:parent-style-name="Text_20_body" style:list-style-name="L1">
      <style:paragraph-properties fo:line-height="150%"/>
    </style:style>
    <style:style style:name="P13" style:family="paragraph" style:parent-style-name="Text_20_body" style:list-style-name="L2">
      <style:paragraph-properties fo:line-height="150%"/>
    </style:style>
    <style:style style:name="P14" style:family="paragraph" style:parent-style-name="Text_20_body" style:list-style-name="L3">
      <style:paragraph-properties fo:line-height="150%"/>
    </style:style>
    <style:style style:name="P15" style:family="paragraph" style:parent-style-name="Text_20_body" style:list-style-name="L3">
      <style:paragraph-properties fo:line-height="150%"/>
      <style:text-properties officeooo:paragraph-rsid="0004300f"/>
    </style:style>
    <style:style style:name="P16" style:family="paragraph" style:parent-style-name="Text_20_body" style:list-style-name="L4">
      <style:paragraph-properties fo:line-height="150%"/>
    </style:style>
    <style:style style:name="P17" style:family="paragraph" style:parent-style-name="Text_20_body">
      <style:paragraph-properties fo:line-height="150%"/>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T1" style:family="text">
      <style:text-properties fo:font-style="italic" style:font-style-asian="italic" style:font-style-complex="italic"/>
    </style:style>
    <style:style style:name="T2" style:family="text">
      <style:text-properties officeooo:rsid="00062e21"/>
    </style:style>
    <style:style style:name="T3"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AI Avatar Frontend Integration Guide</text:p>
      <text:p text:style-name="P7"><text:span text:style-name="Strong_20_Emphasis">Prepared by:</text:span> Franz Kingstein Nesakumar<text:line-break/><text:span text:style-name="Strong_20_Emphasis">Project:</text:span> AI Avatar Interface<text:line-break/><text:span text:style-name="Strong_20_Emphasis">Frontend Stack:</text:span> React 19 + Tailwind CSS + WebSocket<text:line-break/><text:span text:style-name="Strong_20_Emphasis">Note:</text:span> This document is for backend and avatar engineers to understand how to plug their systems into the frontend we've completed.</text:p>
      <text:p text:style-name="P4"/>
      <text:h text:style-name="P11" text:outline-level="1">What’s Already Done (Frontend by Franz)</text:h>
      <text:h text:style-name="P3" text:outline-level="3"><text:s/>1. Frontend UI</text:h>
      <text:list xml:id="list1393792762" text:style-name="L1">
        <text:list-item>
          <text:p text:style-name="P12">Responsive layout with:</text:p>
          <text:list>
            <text:list-item>
              <text:p text:style-name="P12">Sidebar (placeholder links)</text:p>
            </text:list-item>
            <text:list-item>
              <text:p text:style-name="P12"><text:s/>Avatar display area (<text:span text:style-name="Source_20_Text">AvatarArea.jsx</text:span>)</text:p>
            </text:list-item>
            <text:list-item>
              <text:p text:style-name="P12"><text:s/>Chat window with emoji picker and message flow (<text:span text:style-name="Source_20_Text">ChatWindow.jsx</text:span>)</text:p>
            </text:list-item>
            <text:list-item>
              <text:p text:style-name="P12"><text:s/>Control panel with buttons for:</text:p>
              <text:list>
                <text:list-item>
                  <text:p text:style-name="P12">Mic</text:p>
                </text:list-item>
                <text:list-item>
                  <text:p text:style-name="P12">Record</text:p>
                </text:list-item>
                <text:list-item>
                  <text:p text:style-name="P12">Volume</text:p>
                </text:list-item>
                <text:list-item>
                  <text:p text:style-name="P12">Repeat</text:p>
                </text:list-item>
              </text:list>
            </text:list-item>
          </text:list>
        </text:list-item>
      </text:list>
      <text:p text:style-name="P7"/>
      <text:p text:style-name="P7"/>
      <text:p text:style-name="P7"/>
      <text:h text:style-name="P2" text:outline-level="2"><text:soft-page-break/><text:s/>2. WebSocket Integration</text:h>
      <text:list xml:id="list3306546898" text:style-name="L2">
        <text:list-item>
          <text:p text:style-name="P13"><text:span text:style-name="Source_20_Text">socket.io-client</text:span> is used and configured.</text:p>
        </text:list-item>
        <text:list-item>
          <text:p text:style-name="P13">Events:</text:p>
          <text:list>
            <text:list-item>
              <text:p text:style-name="P13">Emit: <text:span text:style-name="Source_20_Text">"user_message"</text:span> → Sends typed user message to backend.</text:p>
            </text:list-item>
            <text:list-item>
              <text:p text:style-name="P13">Listen: <text:span text:style-name="Source_20_Text">"bot_reply"</text:span> → Receives AI response text from backend and displays it in chat.</text:p>
            </text:list-item>
          </text:list>
        </text:list-item>
      </text:list>
      <text:h text:style-name="P2" text:outline-level="2"><text:s/>3. Component Wiring (Backend-Ready)</text:h>
      <text:list xml:id="list4125094199" text:style-name="L3">
        <text:list-item>
          <text:p text:style-name="P14">Buttons in <text:span text:style-name="Source_20_Text">ControlsPanel.jsx</text:span> are wired to emit events like:</text:p>
          <text:list>
            <text:list-item>
              <text:p text:style-name="P14"><text:span text:style-name="Source_20_Text">'record'</text:span></text:p>
            </text:list-item>
            <text:list-item>
              <text:p text:style-name="P14"><text:span text:style-name="Source_20_Text">'mic'</text:span></text:p>
            </text:list-item>
            <text:list-item>
              <text:p text:style-name="P14"><text:span text:style-name="Source_20_Text">'volume'</text:span></text:p>
            </text:list-item>
            <text:list-item>
              <text:p text:style-name="P14"><text:span text:style-name="Source_20_Text">'repeat'</text:span></text:p>
            </text:list-item>
            <text:list-item>
              <text:p text:style-name="P14">You just need to listen for these events on your WebSocket backend.</text:p>
            </text:list-item>
          </text:list>
        </text:list-item>
        <text:list-item>
          <text:p text:style-name="P15">Avatar name is editable via an input field in <text:span text:style-name="Source_20_Text">AvatarArea.jsx</text:span>.</text:p>
        </text:list-item>
      </text:list>
      <text:p text:style-name="P8"/>
      <text:p text:style-name="P8"/>
      <text:p text:style-name="P8"/>
      <text:p text:style-name="P8"/>
      <text:p text:style-name="P8"/>
      <text:p text:style-name="P8"/>
      <text:p text:style-name="P8"/>
      <text:p text:style-name="P8"/>
      <text:p text:style-name="P8"/>
      <text:p text:style-name="P8"/>
      <text:h text:style-name="P11" text:outline-level="1"><text:soft-page-break/><text:s/>Backend Developers — What You Need to Do</text:h>
      <text:p text:style-name="P7"/>
      <text:p text:style-name="P7">You <text:span text:style-name="Strong_20_Emphasis">do not need to modify the frontend</text:span>. Just make your backend respond to the following expectations:</text:p>
      <table:table table:name="Table1" table:style-name="Table1">
        <table:table-column table:style-name="Table1.A"/>
        <table:table-column table:style-name="Table1.B"/>
        <table:table-header-rows>
          <table:table-row>
            <table:table-cell table:style-name="Table1.A1" office:value-type="string">
              <text:p text:style-name="P6">Frontend Action</text:p>
            </table:table-cell>
            <table:table-cell table:style-name="Table1.A1" office:value-type="string">
              <text:p text:style-name="P6">Backend Should...</text:p>
            </table:table-cell>
          </table:table-row>
        </table:table-header-rows>
        <table:table-row>
          <table:table-cell table:style-name="Table1.A1" office:value-type="string">
            <text:p text:style-name="P5">User sends message via chat</text:p>
          </table:table-cell>
          <table:table-cell table:style-name="Table1.A1" office:value-type="string">
            <text:p text:style-name="P5">Listen to <text:span text:style-name="Source_20_Text">"user_message"</text:span> and return AI reply via <text:span text:style-name="Source_20_Text">"bot_reply"</text:span></text:p>
          </table:table-cell>
        </table:table-row>
        <table:table-row>
          <table:table-cell table:style-name="Table1.A1" office:value-type="string">
            <text:p text:style-name="P5">User clicks <text:s/>Mic / Repeat / Volume / Record</text:p>
          </table:table-cell>
          <table:table-cell table:style-name="Table1.A1" office:value-type="string">
            <text:p text:style-name="P5">Listen to these events on the socket (<text:span text:style-name="Source_20_Text">'mic'</text:span>, <text:span text:style-name="Source_20_Text">'repeat'</text:span>, etc.)</text:p>
          </table:table-cell>
        </table:table-row>
        <table:table-row>
          <table:table-cell table:style-name="Table1.A1" office:value-type="string">
            <text:p text:style-name="P5">Avatar placeholder active</text:p>
          </table:table-cell>
          <table:table-cell table:style-name="Table1.A1" office:value-type="string">
            <text:p text:style-name="P5">Send avatar-related animation or audio data to be rendered later (see below)</text:p>
          </table:table-cell>
        </table:table-row>
      </table:table>
      <text:p text:style-name="P7"/>
      <text:p text:style-name="P7"><text:span text:style-name="Strong_20_Emphasis">Backend Must Provide:</text:span></text:p>
      <text:list xml:id="list1877009327" text:style-name="L4">
        <text:list-item>
          <text:p text:style-name="P16">A WebSocket server at:<text:line-break/><text:span text:style-name="Source_20_Text">ws://localhost:8000</text:span> (or update the frontend path if needed)</text:p>
        </text:list-item>
        <text:list-item>
          <text:p text:style-name="P16">Emit <text:span text:style-name="Source_20_Text">bot_reply</text:span> with just a plain string or JSON:</text:p>
        </text:list-item>
      </text:list>
      <text:p text:style-name="P7"/>
      <text:p text:style-name="P7"><text:s text:c="4"/><text:span text:style-name="T1">socket.emit("bot_reply", "This is the AI reply.")</text:span>;</text:p>
      <text:p text:style-name="P7"/>
      <text:p text:style-name="P7"><text:s text:c="5"/>The frontend already handles rendering this message.</text:p>
      <text:p text:style-name="P7"/>
      <text:p text:style-name="P7"/>
      <text:p text:style-name="P7"/>
      <text:p text:style-name="P7"/>
      <text:p text:style-name="P7"/>
      <text:p text:style-name="P7"/>
      <text:p text:style-name="P7"/>
      <text:h text:style-name="P11" text:outline-level="1"><text:soft-page-break/>Avatar Rendering — Integration Info</text:h>
      <text:p text:style-name="P7"/>
      <text:p text:style-name="P7">We’ve prepared the avatar display box (AvatarArea.jsx) as a placeholder.</text:p>
      <text:p text:style-name="P7"/>
      <text:p text:style-name="P7">You (or the 3D devs) can:</text:p>
      <text:p text:style-name="P7"/>
      <text:p text:style-name="P7"><text:s text:c="4"/>Insert a 3D canvas (like three.js, Babylon.js) in the &lt;div className="bg-gray-400"&gt;</text:p>
      <text:p text:style-name="P7"/>
      <text:p text:style-name="P7"><text:s text:c="4"/>Add props like audio waveform or animation instructions</text:p>
      <text:p text:style-name="P7"/>
      <text:p text:style-name="P7"><text:s text:c="4"/>Hook into future socket events (e.g., avatar_lipsync) if needed</text:p>
      <text:p text:style-name="P7"/>
      <text:p text:style-name="P9">We Expect From Avatar Engineer:</text:p>
      <text:p text:style-name="P7"/>
      <text:p text:style-name="P7"><text:s text:c="4"/>The rendering logic for the avatar</text:p>
      <text:p text:style-name="P7"><text:s text:c="4"/>A simple way to feed audio + lip-sync data (once we send it from backend)</text:p>
      <text:p text:style-name="P7"/>
      <text:p text:style-name="P7"><text:s text:c="4"/>Optionally, listen to bot_reply and animate lips accordingly</text:p>
      <text:p text:style-name="P7"/>
      <text:h text:style-name="P3" text:outline-level="3">📎 Summa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Area</text:p>
            </table:table-cell>
            <table:table-cell table:style-name="Table2.A1" office:value-type="string">
              <text:p text:style-name="P6">Status</text:p>
            </table:table-cell>
            <table:table-cell table:style-name="Table2.A1" office:value-type="string">
              <text:p text:style-name="P6">Notes</text:p>
            </table:table-cell>
          </table:table-row>
        </table:table-header-rows>
        <table:table-row>
          <table:table-cell table:style-name="Table2.A1" office:value-type="string">
            <text:p text:style-name="P5">UI Layout</text:p>
          </table:table-cell>
          <table:table-cell table:style-name="Table2.A1" office:value-type="string">
            <text:p text:style-name="P5">Complete</text:p>
          </table:table-cell>
          <table:table-cell table:style-name="Table2.A1" office:value-type="string">
            <text:p text:style-name="P5">Responsive, interactive</text:p>
          </table:table-cell>
        </table:table-row>
        <table:table-row>
          <table:table-cell table:style-name="Table2.A1" office:value-type="string">
            <text:p text:style-name="P5">Chat</text:p>
          </table:table-cell>
          <table:table-cell table:style-name="Table2.A1" office:value-type="string">
            <text:p text:style-name="P5">Complete</text:p>
          </table:table-cell>
          <table:table-cell table:style-name="Table2.A1" office:value-type="string">
            <text:p text:style-name="P5">WebSocket integrated</text:p>
          </table:table-cell>
        </table:table-row>
        <table:table-row>
          <table:table-cell table:style-name="Table2.A1" office:value-type="string">
            <text:p text:style-name="P5">Controls</text:p>
          </table:table-cell>
          <table:table-cell table:style-name="Table2.A1" office:value-type="string">
            <text:p text:style-name="P5">Event-ready</text:p>
          </table:table-cell>
          <table:table-cell table:style-name="Table2.A1" office:value-type="string">
            <text:p text:style-name="P5">Emits events, backend just listens</text:p>
          </table:table-cell>
        </table:table-row>
        <table:table-row>
          <table:table-cell table:style-name="Table2.A1" office:value-type="string">
            <text:p text:style-name="P5">WebSocket</text:p>
          </table:table-cell>
          <table:table-cell table:style-name="Table2.A1" office:value-type="string">
            <text:p text:style-name="P5">Configured</text:p>
          </table:table-cell>
          <table:table-cell table:style-name="Table2.A1" office:value-type="string">
            <text:p text:style-name="P5">Ready to send/receive</text:p>
          </table:table-cell>
        </table:table-row>
        <table:table-row>
          <table:table-cell table:style-name="Table2.A1" office:value-type="string">
            <text:p text:style-name="P5">Avatar</text:p>
          </table:table-cell>
          <table:table-cell table:style-name="Table2.A1" office:value-type="string">
            <text:p text:style-name="P5">Placeholder</text:p>
          </table:table-cell>
          <table:table-cell table:style-name="Table2.A1" office:value-type="string">
            <text:p text:style-name="P5">Needs rendering logic from avatar engineer</text:p>
          </table:table-cell>
        </table:table-row>
      </table:table>
      <text:p text:style-name="P7"/>
      <text:p text:style-name="Title"><text:soft-page-break/>Project Progress Report</text:p>
      <text:p text:style-name="Text_20_body"/>
      <text:p text:style-name="Text_20_body"><text:span text:style-name="Strong_20_Emphasis">To:</text:span> Babilon Mobile<text:line-break/><text:span text:style-name="Strong_20_Emphasis">From:</text:span> Franz Kingstein Nesakumar<text:line-break/><text:span text:style-name="Strong_20_Emphasis">Date:</text:span> June 10, 2025<text:line-break/><text:span text:style-name="Strong_20_Emphasis">Subject:</text:span> <text:span text:style-name="T2">Success pr</text:span>ogress Report – Whisper STT and GUI Development</text:p>
      <text:p text:style-name="Horizontal_20_Line"/>
      <text:h text:style-name="Heading_20_4" text:outline-level="4"><text:span text:style-name="T2">O</text:span>verview</text:h>
      <text:p text:style-name="Text_20_body">This report outlines the progress made on the Speech-to-Text (STT) and GUI development for the Tajik language STT system powered by OpenAI’s Whisper model. The tasks span from tech stack planning to GUI integration and active Whisper model training.</text:p>
      <text:p text:style-name="Horizontal_20_Line"/>
      <text:h text:style-name="Heading_20_4" text:outline-level="4"><text:s/>Completed Task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ask Name</text:p>
            </table:table-cell>
            <table:table-cell table:style-name="Table3.A1" office:value-type="string">
              <text:p text:style-name="Table_20_Heading">Date</text:p>
            </table:table-cell>
            <table:table-cell table:style-name="Table3.A1" office:value-type="string">
              <text:p text:style-name="Table_20_Heading">Status</text:p>
            </table:table-cell>
          </table:table-row>
        </table:table-header-rows>
        <table:table-row>
          <table:table-cell table:style-name="Table3.A1" office:value-type="string">
            <text:p text:style-name="Table_20_Contents">Document for tech stack</text:p>
          </table:table-cell>
          <table:table-cell table:style-name="Table3.A1" office:value-type="string">
            <text:p text:style-name="Table_20_Contents">May 28, 2025</text:p>
          </table:table-cell>
          <table:table-cell table:style-name="Table3.A1" office:value-type="string">
            <text:p text:style-name="Table_20_Contents">Done</text:p>
          </table:table-cell>
        </table:table-row>
        <table:table-row>
          <table:table-cell table:style-name="Table3.A1" office:value-type="string">
            <text:p text:style-name="Table_20_Contents">Code for Whisper, GUI starting</text:p>
          </table:table-cell>
          <table:table-cell table:style-name="Table3.A1" office:value-type="string">
            <text:p text:style-name="Table_20_Contents">May 29, 2025</text:p>
          </table:table-cell>
          <table:table-cell table:style-name="Table3.A1" office:value-type="string">
            <text:p text:style-name="Table_20_Contents">Done</text:p>
          </table:table-cell>
        </table:table-row>
        <table:table-row>
          <table:table-cell table:style-name="Table3.A1" office:value-type="string">
            <text:p text:style-name="Table_20_Contents">Completed GUI and first corrections</text:p>
          </table:table-cell>
          <table:table-cell table:style-name="Table3.A1" office:value-type="string">
            <text:p text:style-name="Table_20_Contents">May 30, 2025</text:p>
          </table:table-cell>
          <table:table-cell table:style-name="Table3.A1" office:value-type="string">
            <text:p text:style-name="Table_20_Contents">Done</text:p>
          </table:table-cell>
        </table:table-row>
        <table:table-row>
          <table:table-cell table:style-name="Table3.A1" office:value-type="string">
            <text:p text:style-name="Table_20_Contents">Presented GUI to team lead</text:p>
          </table:table-cell>
          <table:table-cell table:style-name="Table3.A1" office:value-type="string">
            <text:p text:style-name="Table_20_Contents">June 2, 2025</text:p>
          </table:table-cell>
          <table:table-cell table:style-name="Table3.A1" office:value-type="string">
            <text:p text:style-name="Table_20_Contents">Done</text:p>
          </table:table-cell>
        </table:table-row>
        <table:table-row>
          <table:table-cell table:style-name="Table3.A1" office:value-type="string">
            <text:p text:style-name="Table_20_Contents">First GUI documentation completed</text:p>
          </table:table-cell>
          <table:table-cell table:style-name="Table3.A1" office:value-type="string">
            <text:p text:style-name="Table_20_Contents">June 6, 2025</text:p>
          </table:table-cell>
          <table:table-cell table:style-name="Table3.A1" office:value-type="string">
            <text:p text:style-name="Table_20_Contents">Done</text:p>
          </table:table-cell>
        </table:table-row>
      </table:table>
      <text:p text:style-name="P7"/>
      <text:p text:style-name="P7">These milestones cover foundational design, Whisper setup, and iterative improvements to the GUI after early feedback.</text:p>
      <text:p text:style-name="Horizontal_20_Line"/>
      <text:h text:style-name="Heading_20_4" text:outline-level="4">Work in Progres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ask Name</text:p>
            </table:table-cell>
            <table:table-cell table:style-name="Table4.A1" office:value-type="string">
              <text:p text:style-name="Table_20_Heading">Start Date</text:p>
            </table:table-cell>
            <table:table-cell table:style-name="Table4.A1" office:value-type="string">
              <text:p text:style-name="Table_20_Heading">Status</text:p>
            </table:table-cell>
          </table:table-row>
        </table:table-header-rows>
        <table:table-row>
          <table:table-cell table:style-name="Table4.A1" office:value-type="string">
            <text:p text:style-name="Table_20_Contents">Started with the model training</text:p>
          </table:table-cell>
          <table:table-cell table:style-name="Table4.A1" office:value-type="string">
            <text:p text:style-name="Table_20_Contents">June 3, 2025</text:p>
          </table:table-cell>
          <table:table-cell table:style-name="Table4.A1" office:value-type="string">
            <text:p text:style-name="Table_20_Contents">In progress</text:p>
          </table:table-cell>
        </table:table-row>
        <table:table-row>
          <table:table-cell table:style-name="Table4.A1" office:value-type="string">
            <text:p text:style-name="Table_20_Contents">Error detection and correction of model</text:p>
          </table:table-cell>
          <table:table-cell table:style-name="Table4.A1" office:value-type="string">
            <text:p text:style-name="Table_20_Contents">June 4, 2025</text:p>
          </table:table-cell>
          <table:table-cell table:style-name="Table4.A1" office:value-type="string">
            <text:p text:style-name="Table_20_Contents">In progress</text:p>
          </table:table-cell>
        </table:table-row>
        <table:table-row>
          <table:table-cell table:style-name="Table4.A1" office:value-type="string">
            <text:p text:style-name="Table_20_Contents">Re-correcting the model</text:p>
          </table:table-cell>
          <table:table-cell table:style-name="Table4.A1" office:value-type="string">
            <text:p text:style-name="Table_20_Contents">June 9, 2025</text:p>
          </table:table-cell>
          <table:table-cell table:style-name="Table4.A1" office:value-type="string">
            <text:p text:style-name="Table_20_Contents"><text:span text:style-name="T2">I</text:span>n progress</text:p>
          </table:table-cell>
        </table:table-row>
      </table:table>
      <text:p text:style-name="P7"/>
      <text:h text:style-name="P10" text:outline-level="4">Technical Status &amp; Notes</text:h>
      <text:list xml:id="list3197683665" text:style-name="L5">
        <text:list-item>
          <text:p text:style-name="P18"><text:span text:style-name="Strong_20_Emphasis">Model Training</text:span><text:line-break/>I am currently fine-tuning the Whisper model using the <text:span text:style-name="Strong_20_Emphasis">Tajik subset of Google’s FLEURS dataset</text:span>.<text:line-break/>While significant preprocessing, dataset normalization, and streaming optimizations have been implemented, I’m facing technical obstacles due to:</text:p>
          <text:list>
            <text:list-item>
              <text:p text:style-name="P18"><text:soft-page-break/>Transformers version limitations (currently using <text:span text:style-name="Source_20_Text">4.52.4</text:span>)</text:p>
            </text:list-item>
            <text:list-item>
              <text:p text:style-name="P18">Incompatibilities with <text:span text:style-name="Source_20_Text">TrainingArguments</text:span> in this version</text:p>
            </text:list-item>
            <text:list-item>
              <text:p text:style-name="P18">Memory constraints while batching variable-length audio features</text:p>
            </text:list-item>
            <text:list-item>
              <text:p text:style-name="P18">Frequent interruptions due to resource limits and long training durations on local hardware (non-Colab environment)</text:p>
            </text:list-item>
          </text:list>
        </text:list-item>
        <text:list-item>
          <text:p text:style-name="P18"><text:span text:style-name="Strong_20_Emphasis">GUI Progress</text:span><text:line-break/>A responsive and WebSocket-ready React + Tailwind GUI has been developed, including:</text:p>
          <text:list>
            <text:list-item>
              <text:p text:style-name="P18">An editable avatar placeholder</text:p>
            </text:list-item>
            <text:list-item>
              <text:p text:style-name="P18">Functional chat with emoji support and backend-ready message emitters</text:p>
            </text:list-item>
            <text:list-item>
              <text:p text:style-name="P18">A control panel with buttons for mic, volume, and recording—all event-ready for backend hooks</text:p>
            </text:list-item>
          </text:list>
        </text:list-item>
      </text:list>
      <text:p text:style-name="Horizontal_20_Line"/>
      <text:h text:style-name="Heading_20_4" text:outline-level="4"><text:s/>Deliverables Prepared</text:h>
      <text:list xml:id="list2000080962" text:style-name="L6">
        <text:list-item>
          <text:p text:style-name="P19"><text:span text:style-name="Source_20_Text">whisper.py</text:span>: Memory-efficient model training script with checkpointing and early stopping</text:p>
        </text:list-item>
        <text:list-item>
          <text:p text:style-name="P19">UI Codebase: Modular React components with backend integration points</text:p>
        </text:list-item>
        <text:list-item>
          <text:p text:style-name="P19">Backend Integration Memo (for teammates): Clear instructions for how backend devs can hook into UI controls</text:p>
        </text:list-item>
      </text:list>
      <text:p text:style-name="Horizontal_20_Line"/>
      <text:h text:style-name="Heading_20_4" text:outline-level="4">🛠️ Current Challenge</text:h>
      <text:p text:style-name="Text_20_body">Despite optimizing data pipelines and using streaming for low-RAM usage, model training continues to be resource-intensive and time-consuming on local systems.<text:line-break/>Efforts are ongoing to:</text:p>
      <text:list xml:id="list2841107626" text:style-name="L7">
        <text:list-item>
          <text:p text:style-name="P20">Break dataset into smaller checkpoints</text:p>
        </text:list-item>
        <text:list-item>
          <text:p text:style-name="P20">Resume training automatically after interruptions</text:p>
        </text:list-item>
        <text:list-item>
          <text:p text:style-name="P20">Prepare state-safe recovery logic</text:p>
        </text:list-item>
      </text:list>
      <text:p text:style-name="Horizontal_20_Line"/>
      <text:h text:style-name="Heading_20_4" text:outline-level="4"><text:s/>Next Steps</text:h>
      <text:list xml:id="list138569771" text:style-name="L8">
        <text:list-item>
          <text:p text:style-name="P21">Resolve batching logic in collator (in testing)</text:p>
        </text:list-item>
        <text:list-item>
          <text:p text:style-name="P21">Deploy final round of GUI integration</text:p>
        </text:list-item>
        <text:list-item>
          <text:p text:style-name="P21">Stabilize and document backend sockets</text:p>
        </text:list-item>
        <text:list-item>
          <text:p text:style-name="P21">Complete full evaluation and export trained Whisper model</text:p>
        </text:list-item>
      </text:list>
      <text:p text:style-name="Horizontal_20_Line"/>
      <text:p text:style-name="Text_20_body"><text:soft-page-break/>Thank you for your continued support. Please advise if cloud compute resources can be allocated to help expedite training.</text:p>
      <text:p text:style-name="Text_20_body"><text:span text:style-name="Strong_20_Emphasis">Sincerely,</text:span><text:line-break/>Franz Kingstein Nesakumar<text:line-break/>Speech UI Developer, Babilon Mobil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11:31:11.723289713</meta:creation-date>
    <meta:editing-duration>PT24M58S</meta:editing-duration>
    <meta:editing-cycles>2</meta:editing-cycles>
    <meta:generator>LibreOffice/7.3.7.2$Linux_X86_64 LibreOffice_project/30$Build-2</meta:generator>
    <meta:print-date>2025-06-10T11:35:00.610291157</meta:print-date>
    <dc:date>2025-06-10T12:36:49.164588636</dc:date>
    <meta:document-statistic meta:table-count="4" meta:image-count="0" meta:object-count="0" meta:page-count="7" meta:paragraph-count="133" meta:word-count="836" meta:character-count="5437" meta:non-whitespace-character-count="4728"/>
  </office:meta>
</office:document-meta>
</file>